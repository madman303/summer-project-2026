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e9a85" officeooo:paragraph-rsid="001e9a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项目整体逻辑（大局观）</text:p>
      <text:p text:style-name="Subtitle">项目本质：用已知的乘客特征去预测一个二分类结果（是否生存）</text:p>
      <text:p text:style-name="Text_20_body">整体流程：读数据、看数据（了解缺失、分布）、洗数据（处理缺失值、异常值）、加工特征（创建新信息）、选模型、训练、评估、预测</text:p>
      <text:h text:style-name="Heading_20_1" text:outline-level="1">阶段一：环境搭建 与数据认识</text:h>
      <text:p text:style-name="P1">1.读取CSV文件</text:p>
      <text:p text:style-name="P1">2.用简单的命令查看数据的基本情况</text:p>
      <text:p text:style-name="P1">3.理解每一行的含义</text:p>
      <text:h text:style-name="Heading_20_2" text:outline-level="2">具体任务：</text:h>
      <text:p text:style-name="P1">1.安装python</text:p>
      <text:p text:style-name="P1">2.用padas读取这个文件，并打印前五行</text:p>
      <text:p text:style-name="P1">3.用info()查看每一列有多少个非空值，发现哪些列有缺失值</text:p>
      <text:p text:style-name="P1">4.用 <text:span text:style-name="Source_20_Text">describe()</text:span> 查看数值列的统计信息（均值、最大最小值等）。</text:p>
      <text:p text:style-name="P1">5.总共有多少乘客？</text:p>
      <text:p text:style-name="P1">6.幸存者的比例大概是多少？</text:p>
      <text:p text:style-name="P1">7.哪个特征的缺失最严重？</text:p>
      <text:h text:style-name="Heading_20_1" text:outline-level="1">阶段二：探索性数据分析（EDA）</text:h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7T00:56:05.781855895</meta:creation-date>
    <meta:generator>LibreOffice/25.2.3.2$Linux_X86_64 LibreOffice_project/520$Build-2</meta:generator>
    <dc:date>2026-06-07T13:41:20.732721007</dc:date>
    <meta:editing-duration>PT34M30S</meta:editing-duration>
    <meta:editing-cycles>3</meta:editing-cycles>
    <meta:document-statistic meta:table-count="0" meta:image-count="0" meta:object-count="0" meta:page-count="1" meta:paragraph-count="16" meta:word-count="268" meta:character-count="308" meta:non-whitespace-character-count="305"/>
  </office:meta>
</office:document-meta>
</file>