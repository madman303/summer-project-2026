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1.685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13.66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0.963cm"/>
    </style:style>
    <style:style style:name="co7" style:family="table-column">
      <style:table-column-properties fo:break-before="auto" style:column-width="1.217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3.064cm"/>
    </style:style>
    <style:style style:name="co11" style:family="table-column">
      <style:table-column-properties fo:break-before="auto" style:column-width="1.89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tanic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float" office:value="26.2833" calcext:value-type="float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float" office:value="30.6958" calcext:value-type="float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float" office:value="34.0208" calcext:value-type="float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.125" calcext:value-type="float">
            <text:p>40.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float" office:value="32.3208" calcext:value-type="float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9838" meta:object-count="0"/>
    <meta:generator>LibreOffice/25.2.3.2$Linux_X86_64 LibreOffice_project/520$Build-2</meta:generator>
  </office:meta>
</office:document-meta>
</file>