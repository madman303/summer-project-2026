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97cm" style:rel-column-width="16563*"/>
    </style:style>
    <style:style style:name="表格1.B" style:family="table-column">
      <style:table-column-properties style:column-width="12.704cm" style:rel-column-width="48972*"/>
    </style:style>
    <style:style style:name="表格1.A1" style:family="table-cell">
      <style:table-cell-properties style:writing-mode="pag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97cm" style:rel-column-width="16563*"/>
    </style:style>
    <style:style style:name="表格2.B" style:family="table-column">
      <style:table-column-properties style:column-width="12.704cm" style:rel-column-width="48972*"/>
    </style:style>
    <style:style style:name="表格2.A1" style:family="table-cell">
      <style:table-cell-properties style:writing-mode="page"/>
    </style:style>
    <style:style style:name="表格3" style:family="table">
      <style:table-properties style:width="16.933cm" fo:margin-left="0.074cm" table:align="left"/>
    </style:style>
    <style:style style:name="表格3.A" style:family="table-column">
      <style:table-column-properties style:column-width="3.006cm"/>
    </style:style>
    <style:style style:name="表格3.B" style:family="table-column">
      <style:table-column-properties style:column-width="3.598cm"/>
    </style:style>
    <style:style style:name="表格3.C" style:family="table-column">
      <style:table-column-properties style:column-width="10.329cm"/>
    </style:style>
    <style:style style:name="表格3.A1" style:family="table-cell">
      <style:table-cell-properties style:writing-mode="page"/>
    </style:style>
    <style:style style:name="P1" style:family="paragraph" style:parent-style-name="Heading_20_2">
      <style:text-properties officeooo:rsid="00264b7d" officeooo:paragraph-rsid="00264b7d"/>
    </style:style>
    <style:style style:name="P2" style:family="paragraph" style:parent-style-name="Heading_20_1">
      <style:text-properties officeooo:rsid="00264b7d" officeooo:paragraph-rsid="00264b7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officeooo:rsid="0027d4bd" officeooo:paragraph-rsid="0027d4bd"/>
    </style:style>
    <style:style style:name="T1" style:family="text">
      <style:text-properties officeooo:rsid="001e7e66"/>
    </style:style>
    <style:style style:name="T2" style:family="text">
      <style:text-properties officeooo:rsid="0021dba0"/>
    </style:style>
    <style:style style:name="T3" style:family="text">
      <style:text-properties officeooo:rsid="00264b7d"/>
    </style:style>
    <style:style style:name="T4" style:family="text">
      <style:text-properties officeooo:rsid="0027d4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项目计划书：用户评论情感词云</text:p>
      <text:h text:style-name="Heading_20_1" text:outline-level="1">一<text:span text:style-name="T1">、项目概述</text:span>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ext_20_body">项目名称</text:p>
          </table:table-cell>
          <table:table-cell table:style-name="表格1.A1" office:value-type="string">
            <text:p text:style-name="Text_20_body">豆瓣《活着》短评爬取与词云分析</text:p>
          </table:table-cell>
        </table:table-row>
        <table:table-row>
          <table:table-cell table:style-name="表格1.A1" office:value-type="string">
            <text:p text:style-name="Text_20_body">项目编号</text:p>
          </table:table-cell>
          <table:table-cell table:style-name="表格1.A1" office:value-type="string">
            <text:p text:style-name="Text_20_body">01_comment_wordcloud</text:p>
          </table:table-cell>
        </table:table-row>
        <table:table-row>
          <table:table-cell table:style-name="表格1.A1" office:value-type="string">
            <text:p text:style-name="Text_20_body">开发环境</text:p>
          </table:table-cell>
          <table:table-cell table:style-name="表格1.A1" office:value-type="string">
            <text:p text:style-name="Text_20_body">Debian Linux + Python 3</text:p>
          </table:table-cell>
        </table:table-row>
        <table:table-row>
          <table:table-cell table:style-name="表格1.A1" office:value-type="string">
            <text:p text:style-name="Text_20_body">目标网站</text:p>
          </table:table-cell>
          <table:table-cell table:style-name="表格1.A1" office:value-type="string">
            <text:p text:style-name="Text_20_body"><text:a xlink:type="simple" xlink:href="https://book.douban.com/subject/1085798/comments/" office:target-frame-name="_blank" xlink:show="new" text:style-name="Internet_20_link" text:visited-style-name="Visited_20_Internet_20_Link">https://book.douban.com/subject/1085798/comments/</text:a></text:p>
          </table:table-cell>
        </table:table-row>
        <table:table-row>
          <table:table-cell table:style-name="表格1.A1" office:value-type="string">
            <text:p text:style-name="Text_20_body">核心功能</text:p>
          </table:table-cell>
          <table:table-cell table:style-name="表格1.A1" office:value-type="string">
            <text:p text:style-name="Text_20_body">爬取豆瓣《活着》短评，生成中文词云</text:p>
          </table:table-cell>
        </table:table-row>
      </table:table>
      <text:h text:style-name="Heading_20_1" text:outline-level="1">二、技术栈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Text_20_body">工具库</text:p>
          </table:table-cell>
          <table:table-cell table:style-name="表格2.A1" office:value-type="string">
            <text:p text:style-name="Text_20_body">用途</text:p>
          </table:table-cell>
        </table:table-row>
        <table:table-row>
          <table:table-cell table:style-name="表格2.A1" office:value-type="string">
            <text:p text:style-name="Text_20_body">python<text:span text:style-name="T2">3</text:span></text:p>
          </table:table-cell>
          <table:table-cell table:style-name="表格2.A1" office:value-type="string">
            <text:p text:style-name="Text_20_body">主编程语言</text:p>
          </table:table-cell>
        </table:table-row>
        <table:table-row>
          <table:table-cell table:style-name="表格2.A1" office:value-type="string">
            <text:p text:style-name="Text_20_body">requests</text:p>
          </table:table-cell>
          <table:table-cell table:style-name="表格2.A1" office:value-type="string">
            <text:p text:style-name="Text_20_body">发送HTTP请求</text:p>
          </table:table-cell>
        </table:table-row>
        <table:table-row>
          <table:table-cell table:style-name="表格2.A1" office:value-type="string">
            <text:p text:style-name="Text_20_body">BeautifulSoup4 你 </text:p>
          </table:table-cell>
          <table:table-cell table:style-name="表格2.A1" office:value-type="string">
            <text:p text:style-name="Text_20_body">解析HTML页面</text:p>
          </table:table-cell>
        </table:table-row>
        <table:table-row>
          <table:table-cell table:style-name="表格2.A1" office:value-type="string">
            <text:p text:style-name="Text_20_body">jieba</text:p>
          </table:table-cell>
          <table:table-cell table:style-name="表格2.A1" office:value-type="string">
            <text:p text:style-name="Text_20_body">中文分词</text:p>
          </table:table-cell>
        </table:table-row>
        <table:table-row>
          <table:table-cell table:style-name="表格2.A1" office:value-type="string">
            <text:p text:style-name="Text_20_body">wordcloud</text:p>
          </table:table-cell>
          <table:table-cell table:style-name="表格2.A1" office:value-type="string">
            <text:p text:style-name="Text_20_body">生成词云图</text:p>
          </table:table-cell>
        </table:table-row>
        <table:table-row>
          <table:table-cell table:style-name="表格2.A1" office:value-type="string">
            <text:p text:style-name="Text_20_body">matplotlib</text:p>
          </table:table-cell>
          <table:table-cell table:style-name="表格2.A1" office:value-type="string">
            <text:p text:style-name="Text_20_body">显示/保存词云图</text:p>
          </table:table-cell>
        </table:table-row>
        <table:table-row>
          <table:table-cell table:style-name="表格2.A1" office:value-type="string">
            <text:p text:style-name="Text_20_body">pandas</text:p>
          </table:table-cell>
          <table:table-cell table:style-name="表格2.A1" office:value-type="string">
            <text:p text:style-name="Text_20_body">数据存储与处理</text:p>
          </table:table-cell>
        </table:table-row>
      </table:table>
      <text:h text:style-name="Heading_20_1" text:outline-level="1">三、项目结构</text:h>
      <text:p text:style-name="Text_20_body">summer-project-2025/</text:p>
      <text:p text:style-name="Text_20_body">├── 01_comment_wordcloud/</text:p>
      <text:p text:style-name="Text_20_body">│ <text:s text:c="2"/>├── crawl_comments.py <text:s text:c="5"/># 爬虫代码</text:p>
      <text:p text:style-name="Text_20_body">│ <text:s text:c="2"/>├── comments.json <text:s text:c="9"/># 爬取的原始评论数据</text:p>
      <text:p text:style-name="Text_20_body">│ <text:s text:c="2"/>├── comments.csv <text:s text:c="10"/># 评论数据表格</text:p>
      <text:p text:style-name="Text_20_body">│ <text:s text:c="2"/>├── wordcloud_generator.py # 词云生成代码</text:p>
      <text:p text:style-name="Text_20_body">│ <text:s text:c="2"/>├── wordcloud.png <text:s text:c="9"/># 生成的词云图</text:p>
      <text:p text:style-name="Text_20_body">│ <text:s text:c="2"/>└── stopwords.txt <text:s text:c="9"/># 停用词表（可选）</text:p>
      <text:p text:style-name="Text_20_body">├── notes/</text:p>
      <text:p text:style-name="Text_20_body"><text:soft-page-break/>│ <text:s text:c="2"/>└── 01_page_structure.png <text:s/># HTML结构截图</text:p>
      <text:p text:style-name="Text_20_body">├── requirements.txt <text:s text:c="10"/># Python依赖列表</text:p>
      <text:p text:style-name="Text_20_body">└── README.md <text:s text:c="17"/># 项目说明</text:p>
      <text:h text:style-name="Heading_20_1" text:outline-level="1">四、环境搭建步骤</text:h>
      <text:h text:style-name="Heading_20_2" text:outline-level="2">4.1系统环境（Debian）</text:h>
      <text:h text:style-name="Heading_20_2" text:outline-level="2">4.2创建虚拟环境并安装依赖</text:h>
      <text:h text:style-name="Heading_20_2" text:outline-level="2">4.3生成requirements.txt</text:h>
      <text:h text:style-name="Heading_20_1" text:outline-level="1">五、爬虫代码实现</text:h>
      <text:h text:style-name="Heading_20_2" text:outline-level="2">5.1爬取评论</text:h>
      <text:h text:style-name="Heading_20_2" text:outline-level="2">5.2生成词云</text:h>
      <text:h text:style-name="Heading_20_1" text:outline-level="1">六、运行说明</text:h>
      <text:h text:style-name="P1" text:outline-level="2">6.1运行爬虫</text:h>
      <text:h text:style-name="P1" text:outline-level="2">6.2生成词云</text:h>
      <text:h text:style-name="Heading_20_1" text:outline-level="1">七、注意事项（避坑指南）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ext_20_body">问题</text:p>
          </table:table-cell>
          <table:table-cell table:style-name="表格3.A1" office:value-type="string">
            <text:p text:style-name="Text_20_body">原因</text:p>
          </table:table-cell>
          <table:table-cell table:style-name="表格3.A1" office:value-type="string">
            <text:p text:style-name="Text_20_body">解决方法</text:p>
          </table:table-cell>
        </table:table-row>
        <table:table-row>
          <table:table-cell table:style-name="表格3.A1" office:value-type="string">
            <text:p text:style-name="Text_20_body">返回<text:span text:style-name="T3">418</text:span></text:p>
          </table:table-cell>
          <table:table-cell table:style-name="表格3.A1" office:value-type="string">
            <text:p text:style-name="Text_20_body">反爬虫拦截</text:p>
          </table:table-cell>
          <table:table-cell table:style-name="表格3.A1" office:value-type="string">
            <text:p text:style-name="Text_20_body">必须携带完整的Cookie,添加User-Agent</text:p>
          </table:table-cell>
        </table:table-row>
        <table:table-row>
          <table:table-cell table:style-name="表格3.A1" office:value-type="string">
            <text:p text:style-name="Text_20_body">评论抓不到</text:p>
          </table:table-cell>
          <table:table-cell table:style-name="表格3.A1" office:value-type="string">
            <text:p text:style-name="Text_20_body">HTML结构变化</text:p>
          </table:table-cell>
          <table:table-cell table:style-name="表格3.A1" office:value-type="string">
            <text:p text:style-name="Text_20_body">同时适配.<text:span text:style-name="T3">short和.comment-content</text:span></text:p>
          </table:table-cell>
        </table:table-row>
        <table:table-row>
          <table:table-cell table:style-name="表格3.A1" office:value-type="string">
            <text:p text:style-name="Text_20_body">中文显示方块</text:p>
          </table:table-cell>
          <table:table-cell table:style-name="表格3.A1" office:value-type="string">
            <text:p text:style-name="Text_20_body">字体不支持中文</text:p>
          </table:table-cell>
          <table:table-cell table:style-name="表格3.A1" office:value-type="string">
            <text:p text:style-name="Text_20_body">制定中文字体路径</text:p>
          </table:table-cell>
        </table:table-row>
        <table:table-row>
          <table:table-cell table:style-name="表格3.A1" office:value-type="string">
            <text:p text:style-name="Text_20_body">jieba分词不准确</text:p>
          </table:table-cell>
          <table:table-cell table:style-name="表格3.A1" office:value-type="string">
            <text:p text:style-name="Text_20_body">默认词典</text:p>
          </table:table-cell>
          <table:table-cell table:style-name="表格3.A1" office:value-type="string">
            <text:p text:style-name="Text_20_body">可添加自定义词典或调整<text:span text:style-name="T3">cut_all参数</text:span></text:p>
          </table:table-cell>
        </table:table-row>
        <table:table-row>
          <table:table-cell table:style-name="表格3.A1" office:value-type="string">
            <text:p text:style-name="Text_20_body">请求被封IP</text:p>
          </table:table-cell>
          <table:table-cell table:style-name="表格3.A1" office:value-type="string">
            <text:p text:style-name="Text_20_body">请求频率过高</text:p>
          </table:table-cell>
          <table:table-cell table:style-name="表格3.A1" office:value-type="string">
            <text:p text:style-name="Text_20_body">每次请求后<text:span text:style-name="T3">time.sleep(2)</text:span></text:p>
          </table:table-cell>
        </table:table-row>
      </table:table>
      <text:p text:style-name="Text_20_body"/>
      <text:h text:style-name="P2" text:outline-level="1"><text:soft-page-break/>八、Cookie获取方法</text:h>
      <text:p text:style-name="Text_20_body">用浏览器打开豆瓣并登录</text:p>
      <text:list text:style-name="L1">
        <text:list-item>
          <text:p text:style-name="P3">按 F12 → Network 标签</text:p>
        </text:list-item>
      </text:list>
      <text:list text:style-name="L2">
        <text:list-item>
          <text:p text:style-name="P4">刷新页面，点击任意请求</text:p>
        </text:list-item>
      </text:list>
      <text:list text:style-name="L3">
        <text:list-item>
          <text:p text:style-name="P5">找到 Request Headers 中的 <text:span text:style-name="Source_20_Text">Cookie:</text:span></text:p>
        </text:list-item>
      </text:list>
      <text:list text:style-name="L4">
        <text:list-item>
          <text:p text:style-name="P6">复制整段内容（从 <text:span text:style-name="Source_20_Text">bid=</text:span> 开始到末尾</text:p>
        </text:list-item>
      </text:list>
      <text:p text:style-name="Text_20_body"/>
      <text:p text:style-name="P7">当爬取数量较少的时候，先使用for循环，当爬取数量较多的时候可以考虑使用多线程或者异步来加速爬取，其实也可以尝试一下递归，但是使用递归可能会出现深度限制的问题</text:p>
      <text:h text:style-name="Heading_20_1" text:outline-level="1">注意<text:span text:style-name="T4">：</text:span></text:h>
      <text:p text:style-name="Text_20_body">不要并发<text:span text:style-name="T4">（多线程）：如果同时发起多个请求将会瞬间触发反爬</text:span></text:p>
      <text:p text:style-name="Text_20_body">Cookie需要定期更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8T17:08:34.508490452</meta:creation-date>
    <dc:date>2026-06-07T16:26:43.414646745</dc:date>
    <meta:editing-duration>PT13M22S</meta:editing-duration>
    <meta:editing-cycles>3</meta:editing-cycles>
    <meta:generator>LibreOffice/25.2.3.2$Linux_X86_64 LibreOffice_project/520$Build-2</meta:generator>
    <meta:document-statistic meta:table-count="3" meta:image-count="0" meta:object-count="0" meta:page-count="3" meta:paragraph-count="81" meta:word-count="593" meta:character-count="1207" meta:non-whitespace-character-count="1071"/>
  </office:meta>
</office:document-meta>
</file>